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fo:font-size="15pt" fo:font-weight="bold" officeooo:rsid="06b77c59" officeooo:paragraph-rsid="06b77c59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/>
      <style:text-properties fo:font-size="15pt" fo:font-weight="bold" officeooo:rsid="041d4e41" officeooo:paragraph-rsid="06b1914f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fo:font-size="15pt" fo:font-weight="bold" officeooo:rsid="041d4e41" officeooo:paragraph-rsid="06a04fce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fo:font-size="15pt" officeooo:rsid="041d4e41" officeooo:paragraph-rsid="06a04fce" style:font-size-asian="15pt" style:font-size-complex="15pt"/>
    </style:style>
    <style:style style:name="P5" style:family="paragraph" style:parent-style-name="Standard">
      <style:paragraph-properties fo:line-height="115%"/>
      <style:text-properties fo:font-size="15pt" fo:font-weight="bold" officeooo:rsid="041e1022" officeooo:paragraph-rsid="06a04fce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/>
      <style:text-properties fo:font-size="15pt" officeooo:rsid="0020ef8d" officeooo:paragraph-rsid="06a04fce" style:font-size-asian="15pt" style:font-size-complex="15pt"/>
    </style:style>
    <style:style style:name="P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f597a" officeooo:paragraph-rsid="069535a3" style:font-size-asian="15pt" style:font-size-complex="15pt"/>
    </style:style>
    <style:style style:name="P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f597a" officeooo:paragraph-rsid="063f597a" style:font-size-asian="15pt" style:font-size-complex="15pt"/>
    </style:style>
    <style:style style:name="P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93e6d0" officeooo:paragraph-rsid="0693e6d0" style:font-size-asian="15pt" style:font-size-complex="15pt"/>
    </style:style>
    <style:style style:name="P1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90baa3" officeooo:paragraph-rsid="0690baa3" style:font-size-asian="15pt" style:font-size-complex="15pt"/>
    </style:style>
    <style:style style:name="P1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style:font-size-asian="15pt" style:font-size-complex="15pt"/>
    </style:style>
    <style:style style:name="P1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e8f42" officeooo:paragraph-rsid="063e8f42" style:font-size-asian="15pt" style:font-size-complex="15pt"/>
    </style:style>
    <style:style style:name="P1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320050" officeooo:paragraph-rsid="0633aceb" style:font-size-asian="15pt" style:font-size-complex="15pt"/>
    </style:style>
    <style:style style:name="P1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style:font-size-asian="15pt" style:font-size-complex="15pt"/>
    </style:style>
    <style:style style:name="P1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dc23" officeooo:paragraph-rsid="0632d7df" style:font-size-asian="15pt" style:font-size-complex="15pt"/>
    </style:style>
    <style:style style:name="P1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dc23" style:font-size-asian="15pt" style:font-weight-asian="bold" style:font-size-complex="15pt" style:font-weight-complex="bold"/>
    </style:style>
    <style:style style:name="P1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fcbb05" officeooo:paragraph-rsid="05fcbb05" style:font-size-asian="15pt" style:font-size-complex="15pt"/>
    </style:style>
    <style:style style:name="P1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6012c46" officeooo:paragraph-rsid="06012c46" style:font-size-asian="15pt" style:font-size-complex="15pt"/>
    </style:style>
    <style:style style:name="P1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fo:font-weight="bold" officeooo:rsid="05e5eb64" officeooo:paragraph-rsid="05e5eb6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5eb64" officeooo:paragraph-rsid="05e5eb64" style:font-size-asian="15pt" style:font-size-complex="15pt"/>
    </style:style>
    <style:style style:name="P2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7a3a4" officeooo:paragraph-rsid="05e7a3a4" style:font-size-asian="15pt" style:font-size-complex="15pt"/>
    </style:style>
    <style:style style:name="P2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c2ed89" style:font-size-asian="15pt" style:font-size-complex="15pt"/>
    </style:style>
    <style:style style:name="P23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24" style:family="paragraph" style:parent-style-name="Standard">
      <style:paragraph-properties fo:line-height="115%" fo:break-before="page">
        <style:tab-stops>
          <style:tab-stop style:position="5.891cm"/>
        </style:tab-stops>
      </style:paragraph-properties>
      <style:text-properties fo:font-size="15pt" officeooo:rsid="0585252b" officeooo:paragraph-rsid="05e97146" style:font-size-asian="15pt" style:font-size-complex="15pt"/>
    </style:style>
    <style:style style:name="P2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377d" style:font-size-asian="15pt" style:font-size-complex="15pt"/>
    </style:style>
    <style:style style:name="P2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ea5b8c" style:font-size-asian="15pt" style:font-size-complex="15pt"/>
    </style:style>
    <style:style style:name="P27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cf7c8" officeooo:paragraph-rsid="05ecf7c8" style:font-size-asian="15pt" style:font-size-complex="15pt"/>
    </style:style>
    <style:style style:name="P2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ef91ad" officeooo:paragraph-rsid="05ef91ad" style:font-size-asian="15pt" style:font-size-complex="15pt"/>
    </style:style>
    <style:style style:name="P29" style:family="paragraph" style:parent-style-name="Text_20_body">
      <style:paragraph-properties>
        <style:tab-stops>
          <style:tab-stop style:position="5.891cm"/>
        </style:tab-stops>
      </style:paragraph-properties>
      <style:text-properties fo:font-size="15pt" officeooo:rsid="05c0aa44" officeooo:paragraph-rsid="05c1f1e0" style:font-size-asian="15pt" style:font-size-complex="15pt"/>
    </style:style>
    <style:style style:name="P30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cdc91" style:font-size-asian="15pt" style:font-size-complex="15pt"/>
    </style:style>
    <style:style style:name="P31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bc60a4" officeooo:paragraph-rsid="059a93a2" style:font-size-asian="15pt" style:font-size-complex="15pt"/>
    </style:style>
    <style:style style:name="P32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5252b" officeooo:paragraph-rsid="0585252b" style:font-size-asian="15pt" style:font-size-complex="15pt"/>
    </style:style>
    <style:style style:name="P33" style:family="paragraph" style:parent-style-name="Standard">
      <style:paragraph-properties fo:line-height="115%"/>
      <style:text-properties fo:font-size="15pt" officeooo:rsid="0429c47b" officeooo:paragraph-rsid="05894687" style:font-size-asian="15pt" style:font-size-complex="15pt"/>
    </style:style>
    <style:style style:name="P34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894687" officeooo:paragraph-rsid="05894687" style:font-size-asian="15pt" style:font-size-complex="15pt"/>
    </style:style>
    <style:style style:name="P35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85252b" style:font-size-asian="15pt" style:font-size-complex="15pt"/>
    </style:style>
    <style:style style:name="P36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d9bbb" officeooo:paragraph-rsid="057d9bbb" style:font-size-asian="15pt" style:font-size-complex="15pt"/>
    </style:style>
    <style:style style:name="P37" style:family="paragraph" style:parent-style-name="Standard">
      <style:paragraph-properties fo:line-height="115%"/>
      <style:text-properties fo:font-size="15pt" officeooo:rsid="0429c47b" officeooo:paragraph-rsid="055f0531" style:font-size-asian="15pt" style:font-size-complex="15pt"/>
    </style:style>
    <style:style style:name="P38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5770e05" officeooo:paragraph-rsid="053eb342" style:font-size-asian="15pt" style:font-size-complex="15pt"/>
    </style:style>
    <style:style style:name="P39" style:family="paragraph" style:parent-style-name="Standard">
      <style:paragraph-properties fo:line-height="115%">
        <style:tab-stops>
          <style:tab-stop style:position="5.891cm"/>
        </style:tab-stops>
      </style:paragraph-properties>
      <style:text-properties fo:font-size="15pt" officeooo:rsid="0429c47b" officeooo:paragraph-rsid="053eb342" style:font-size-asian="15pt" style:font-size-complex="15pt"/>
    </style:style>
    <style:style style:name="P40" style:family="paragraph" style:parent-style-name="Standard">
      <style:paragraph-properties fo:line-height="115%"/>
      <style:text-properties fo:font-size="15pt" officeooo:rsid="0429c47b" officeooo:paragraph-rsid="041df43a" style:font-size-asian="15pt" style:font-size-complex="15pt"/>
    </style:style>
    <style:style style:name="T1" style:family="text">
      <style:text-properties officeooo:rsid="06b326e8"/>
    </style:style>
    <style:style style:name="T2" style:family="text">
      <style:text-properties officeooo:rsid="0432fe93"/>
    </style:style>
    <style:style style:name="T3" style:family="text">
      <style:text-properties officeooo:rsid="042a90ac"/>
    </style:style>
    <style:style style:name="T4" style:family="text">
      <style:text-properties officeooo:rsid="06329d83"/>
    </style:style>
    <style:style style:name="T5" style:family="text">
      <style:text-properties officeooo:rsid="06acac3a"/>
    </style:style>
    <style:style style:name="T6" style:family="text">
      <style:text-properties officeooo:rsid="05e79f3b"/>
    </style:style>
    <style:style style:name="T7" style:family="text">
      <style:text-properties officeooo:rsid="05e7a3a4"/>
    </style:style>
    <style:style style:name="T8" style:family="text">
      <style:text-properties officeooo:rsid="05e97146"/>
    </style:style>
    <style:style style:name="T9" style:family="text">
      <style:text-properties officeooo:rsid="05ea377d"/>
    </style:style>
    <style:style style:name="T10" style:family="text">
      <style:text-properties officeooo:rsid="05ea5b8c"/>
    </style:style>
    <style:style style:name="T11" style:family="text">
      <style:text-properties officeooo:rsid="05ec2ff6"/>
    </style:style>
    <style:style style:name="T12" style:family="text">
      <style:text-properties officeooo:rsid="05ecf7c8"/>
    </style:style>
    <style:style style:name="T13" style:family="text">
      <style:text-properties officeooo:rsid="05ed794e"/>
    </style:style>
    <style:style style:name="T14" style:family="text">
      <style:text-properties officeooo:rsid="05c2ed89"/>
    </style:style>
    <style:style style:name="T15" style:family="text">
      <style:text-properties officeooo:rsid="05c1f1e0"/>
    </style:style>
    <style:style style:name="T16" style:family="text">
      <style:text-properties officeooo:rsid="05c0e0cd"/>
    </style:style>
    <style:style style:name="T17" style:family="text">
      <style:text-properties fo:font-variant="normal" fo:text-transform="none" fo:color="#2d6df6" loext:opacity="100%" fo:font-family="Arial, sans-serif" fo:letter-spacing="normal" fo:font-style="normal" fo:font-weight="normal"/>
    </style:style>
    <style:style style:name="T18" style:family="text">
      <style:text-properties fo:font-variant="normal" fo:text-transform="none" fo:color="#2d6df6" loext:opacity="100%" fo:font-family="Arial, sans-serif" fo:letter-spacing="normal" fo:font-style="normal" fo:font-weight="normal" officeooo:rsid="05c0e0cd"/>
    </style:style>
    <style:style style:name="T19" style:family="text">
      <style:text-properties fo:font-variant="normal" fo:text-transform="none" fo:color="#2d6df6" loext:opacity="100%" fo:font-family="Arial, sans-serif" fo:letter-spacing="normal" fo:font-style="normal" fo:font-weight="normal" officeooo:rsid="0585252b"/>
    </style:style>
    <style:style style:name="T20" style:family="text">
      <style:text-properties fo:font-variant="normal" fo:text-transform="none" fo:color="#2d6df6" loext:opacity="100%" fo:font-family="Arial, sans-serif" fo:letter-spacing="normal" fo:font-style="normal" fo:font-weight="normal" officeooo:rsid="05c1f1e0"/>
    </style:style>
    <style:style style:name="T21" style:family="text">
      <style:text-properties officeooo:rsid="05852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EGAR IMAGENES A Matriz de Pequeños Eventos</text:p>
      <text:p text:style-name="P2">Emblemas Externos</text:p>
      <text:p text:style-name="P2">Pequeños Rayones</text:p>
      <text:p text:style-name="P2">Tapa de gasolina</text:p>
      <text:p text:style-name="P2">Brazo Limpia Brisas</text:p>
      <text:p text:style-name="P2">Películas de Seguridad</text:p>
      <text:p text:style-name="P2">Rectificación de Rine<text:span text:style-name="T1">s</text:span></text:p>
      <text:p text:style-name="P3">Llan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2</text:span><text:span text:style-name="T3">. </text:span>VINCULAR MAPAS CON GOOGLE MAPS.</text:p>
      <text:p text:style-name="P4"/>
      <text:p text:style-name="P4"/>
      <text:p text:style-name="P4"/>
      <text:p text:style-name="P4"/>
      <text:p text:style-name="P5"><text:span text:style-name="T2">1</text:span><text:span text:style-name="T3">. </text:span>ACTUALIZAR TIPIFICACIÓN DE VH</text:p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>#################################</text:p>
      <text:p text:style-name="P8"/>
      <text:p text:style-name="P9">PENDIENTE DE JUAN PASAR EL LISTADO DE TALLERES DE PESADOS</text:p>
      <text:p text:style-name="P8"/>
      <text:p text:style-name="P10">PENDIENTE VALIDAR HASTA DONDE CUBRE CARTAGO Y PEREIRA</text:p>
      <text:p text:style-name="P8"/>
      <text:p text:style-name="P8">#################################</text:p>
      <text:p text:style-name="P8">No modificar este estado, ya que es automático.</text:p>
      <text:p text:style-name="P8">Tipo de transición: Automática: Color Naranja</text:p>
      <text:p text:style-name="P8"/>
      <text:p text:style-name="P11">----------------..</text:p>
      <text:p text:style-name="P11">&lt;p style="margin: 4px 0; background-color: orange;"&gt;&lt;strong&gt;⚙️ Tipo de transición:&lt;/strong&gt; Automática 🤖&lt;/p&gt;</text:p>
      <text:p text:style-name="P11">#################################</text:p>
      <text:p text:style-name="P12">FLUJOS DE ESTADO</text:p>
      <text:p text:style-name="P12"/>
      <text:p text:style-name="P13"><text:s text:c="20"/>&lt;div style="margin-top: 8px; padding-top: 6px; border-top: 1px solid #eee; font-size: 15px; color: #000000;"&gt;</text:p>
      <text:p text:style-name="P14"/>
      <text:p text:style-name="P15">#################################</text:p>
      <text:p text:style-name="P16">Guiones</text:p>
      <text:p text:style-name="P17">Agregar guión cuando se recibe grúa pesado</text:p>
      <text:p text:style-name="P14"/>
      <text:p text:style-name="P14"/>
      <text:p text:style-name="P14"/>
      <text:p text:style-name="P14">#################################</text:p>
      <text:p text:style-name="P18">Gestión Cierre de Bloqueo</text:p>
      <text:p text:style-name="P18">Validar con Nora Sanchez y Manuela Grisales</text:p>
      <text:p text:style-name="P14">#################################</text:p>
      <text:p text:style-name="P14"/>
      <text:p text:style-name="P14"/>
      <text:p text:style-name="P14">Ya se utilizó:</text:p>
      <text:p text:style-name="P14">V<text:span text:style-name="T4">7</text:span><text:span text:style-name="T5">9</text:span></text:p>
      <text:p text:style-name="P14"/>
      <text:p text:style-name="P14"/>
      <text:p text:style-name="P14">#################################</text:p>
      <text:p text:style-name="P14"/>
      <text:p text:style-name="P14"/>
      <text:p text:style-name="P14"/>
      <text:p text:style-name="P14"/>
      <text:p text:style-name="P14">#################################</text:p>
      <text:p text:style-name="P14"/>
      <text:p text:style-name="P14"/>
      <text:p text:style-name="P14"/>
      <text:p text:style-name="P14"/>
      <text:p text:style-name="P14">#################################</text:p>
      <text:p text:style-name="P14"/>
      <text:p text:style-name="P14"/>
      <text:p text:style-name="P14"/>
      <text:p text:style-name="P14"/>
      <text:p text:style-name="P14">#################################</text:p>
      <text:p text:style-name="P14"/>
      <text:p text:style-name="P14"/>
      <text:p text:style-name="P14"/>
      <text:p text:style-name="P14"/>
      <text:p text:style-name="P14">#################################</text:p>
      <text:p text:style-name="P14"/>
      <text:p text:style-name="P14"/>
      <text:p text:style-name="P14"/>
      <text:p text:style-name="P14"/>
      <text:p text:style-name="P14"/>
      <text:p text:style-name="P14">#################################</text:p>
      <text:p text:style-name="P19">Errores en la tabla de distancia:</text:p>
      <text:p text:style-name="P20">- Medellín está muchas veces escrita mal y al reves como en antioquia.</text:p>
      <text:p text:style-name="P20">- Bogotá está mal escrito duplicado.</text:p>
      <text:p text:style-name="P20">- Cúcuta, Está duplicado.</text:p>
      <text:p text:style-name="P20">- Cali, está mal escrita muchas veces.</text:p>
      <text:p text:style-name="P20">- Barrancabermeja, está duplicado.</text:p>
      <text:p text:style-name="P20">- Cartago, duplicado.</text:p>
      <text:p text:style-name="P20">- <text:span text:style-name="T6">Bucaramanga, muchas veces.</text:span></text:p>
      <text:p text:style-name="P20">- <text:span text:style-name="T6">Pereira, duplicado</text:span></text:p>
      <text:p text:style-name="P20">- <text:span text:style-name="T6">Bello, duplicado.</text:span></text:p>
      <text:p text:style-name="P20">- <text:span text:style-name="T7">Ibagué, está con otro departamento y al reves como departamento</text:span></text:p>
      <text:p text:style-name="P20">- <text:span text:style-name="T7">Santa Marta, al reves como departamento</text:span></text:p>
      <text:p text:style-name="P20">- <text:span text:style-name="T7">Manizales, al reves como departamento y duplicado.</text:span></text:p>
      <text:p text:style-name="P20">- <text:span text:style-name="T7">Buenaventura, mal escrito</text:span></text:p>
      <text:p text:style-name="P20">- <text:span text:style-name="T7">Villavicencio, duplicado y con otro departamento.</text:span></text:p>
      <text:p text:style-name="P20">- <text:span text:style-name="T7">Pasto, repetido.</text:span></text:p>
      <text:p text:style-name="P20">- <text:span text:style-name="T7">Montería, repetido</text:span></text:p>
      <text:p text:style-name="P20">- <text:span text:style-name="T7">Neiva, repetido</text:span></text:p>
      <text:p text:style-name="P21">- Armenia, como departamento.</text:p>
      <text:p text:style-name="P21">- Sincelejo, como departamento.</text:p>
      <text:p text:style-name="P21">- Chia, repetido</text:p>
      <text:p text:style-name="P22">- <text:span text:style-name="T8">Buga, debe decir el nombre del departamento completo y como guadalajara de buga</text:span></text:p>
      <text:p text:style-name="P22">- <text:span text:style-name="T8">Bugalagrande, con espacio</text:span></text:p>
      <text:p text:style-name="P22">- <text:span text:style-name="T8">Buenaventura, debe decir el nombre del departamento completo</text:span></text:p>
      <text:p text:style-name="P23">- <text:span text:style-name="T8">Palmira, debe decir el nombre del departamento completo</text:span></text:p>
      <text:p text:style-name="P23">- <text:span text:style-name="T8">Tulua, debe decir el nombre del departamento completo</text:span></text:p>
      <text:p text:style-name="P23">- <text:span text:style-name="T8">Alcala, debe decir el nombre del departamento completo</text:span></text:p>
      <text:p text:style-name="P23">- <text:span text:style-name="T8">Andalucia, debe decir el nombre del departamento completo</text:span></text:p>
      <text:p text:style-name="P23">- <text:span text:style-name="T9">Caicedonia</text:span><text:span text:style-name="T8">, debe decir el nombre del departamento completo </text:span><text:span text:style-name="T9">y repetido</text:span></text:p>
      <text:p text:style-name="P23">- <text:span text:style-name="T9">Jamundi</text:span><text:span text:style-name="T8">, debe decir el nombre del departamento completo</text:span></text:p>
      <text:p text:style-name="P24">- <text:span text:style-name="T9">Guacari</text:span><text:span text:style-name="T8">, debe decir el nombre del departamento completo</text:span></text:p>
      <text:p text:style-name="P25">- <text:span text:style-name="T9">Cerrito</text:span><text:span text:style-name="T8">, debe decir el nombre del departamento completo</text:span></text:p>
      <text:p text:style-name="P25">- <text:span text:style-name="T9">Sevilla</text:span><text:span text:style-name="T8">, debe decir el nombre del departamento completo</text:span></text:p>
      <text:p text:style-name="P25">- S<text:span text:style-name="T9">tder de quilichao</text:span><text:span text:style-name="T8">, debe decir el nombre del departamento completo</text:span></text:p>
      <text:p text:style-name="P26">- <text:span text:style-name="T10">Vijes</text:span><text:span text:style-name="T8">, debe decir el nombre del departamento completo</text:span></text:p>
      <text:p text:style-name="P25">- <text:span text:style-name="T10">Yocoto</text:span><text:span text:style-name="T8">, debe decir el nombre del departamento completo</text:span></text:p>
      <text:p text:style-name="P25">- <text:span text:style-name="T10">Yumbo</text:span><text:span text:style-name="T8">, debe decir el nombre del departamento completo</text:span></text:p>
      <text:p text:style-name="P26">- <text:span text:style-name="T10">Zarzal</text:span><text:span text:style-name="T8">, debe decir el nombre del departamento completo</text:span></text:p>
      <text:p text:style-name="P26">- <text:span text:style-name="T11">Riohacha, repetido</text:span></text:p>
      <text:p text:style-name="P26">- <text:span text:style-name="T11">Popayan, refleja uno como departamento</text:span></text:p>
      <text:p text:style-name="P26">- <text:span text:style-name="T11">Tunja, repetido y como departamento</text:span></text:p>
      <text:p text:style-name="P26">- <text:span text:style-name="T11">Sahagun, como departamento</text:span></text:p>
      <text:p text:style-name="P26">- Florencia, <text:span text:style-name="T11">repetido y como departamento</text:span></text:p>
      <text:p text:style-name="P26">- Yopal, <text:span text:style-name="T11">repetido</text:span></text:p>
      <text:p text:style-name="P26">- Ipiales, <text:span text:style-name="T11">repetido</text:span></text:p>
      <text:p text:style-name="P26">- Fusagasug<text:span text:style-name="T11">a, repetido</text:span></text:p>
      <text:p text:style-name="P26">- <text:span text:style-name="T12">Pitalito, repetido</text:span></text:p>
      <text:p text:style-name="P27">- Sogamoso, repetido</text:p>
      <text:p text:style-name="P26">- <text:span text:style-name="T12">Quibdo, repetido</text:span></text:p>
      <text:p text:style-name="P26">- Duitama, <text:span text:style-name="T12">repetido</text:span></text:p>
      <text:p text:style-name="P26">- <text:span text:style-name="T12">Tame, repetido</text:span></text:p>
      <text:p text:style-name="P26">- Girardot, <text:span text:style-name="T12">repetido y con otro departamento</text:span></text:p>
      <text:p text:style-name="P26">- Ci<text:span text:style-name="T12">e</text:span>naga de Oro, <text:span text:style-name="T12">repetido</text:span></text:p>
      <text:p text:style-name="P26">- <text:span text:style-name="T12">Cienaga, como departamento.</text:span></text:p>
      <text:p text:style-name="P26">- Montel<text:span text:style-name="T12">i</text:span>bano, <text:span text:style-name="T12">repetido</text:span></text:p>
      <text:p text:style-name="P26">- <text:span text:style-name="T12">Maicao, repetido</text:span></text:p>
      <text:p text:style-name="P26">- Zipaquir<text:span text:style-name="T12">a, repetido</text:span></text:p>
      <text:p text:style-name="P26">- Facatativá, <text:span text:style-name="T13">repetido</text:span></text:p>
      <text:p text:style-name="P22"/>
      <text:p text:style-name="P22">----------------</text:p>
      <text:p text:style-name="P28">SUGERENCIA:</text:p>
      <text:p text:style-name="P22">Grúa: Asistencia Vehículos Pesados y Utilitarios Pesados</text:p>
      <text:p text:style-name="P22">Excedente Km:</text:p>
      <text:p text:style-name="P22">Andres Delgado</text:p>
      <text:p text:style-name="P22">Nota de valor de 150.000 pesos se cobra excedente</text:p>
      <text:p text:style-name="P22"/>
      <text:p text:style-name="P22">----------------</text:p>
      <text:p text:style-name="P22">- Matriz de Pequeños Eventos: <text:s/><text:span text:style-name="T14">Agregar partes el vh en imagenes señaladas. (Pendiente de Juan)</text:span></text:p>
      <text:p text:style-name="P29">-Crear articulo: Contingencia de Aplicativos. <text:a xlink:type="simple" xlink:href="https://nik.grupokonecta.co:7070/#/app/articles/18274" text:style-name="Internet_20_link" text:visited-style-name="Visited_20_Internet_20_Link">https://nik.grupokonecta.co:7070/#/app/articles/18274</text:a> <text:span text:style-name="T15">(Pendiente de Juan)</text:span></text:p>
      <text:p text:style-name="P29">-Crear artículo: Geocerca de Movilidad Flexible <text:span text:style-name="T15">(Pendiente de Juan)</text:span></text:p>
      <text:p text:style-name="P29">- <text:span text:style-name="T16">Crear Artículo: Guias de Objeción: </text:span><text:a xlink:type="simple" xlink:href="https://nik.grupokonecta.co:7070/#/app/articles/38211" text:style-name="Internet_20_link" text:visited-style-name="Visited_20_Internet_20_Link"><text:span text:style-name="T16">https://nik.grupokonecta.co:7070/#/app/articles/38211</text:span></text:a><text:span text:style-name="T16"> </text:span><text:span text:style-name="T15">(Pendiente de Juan)</text:span></text:p>
      <text:p text:style-name="P29"><text:span text:style-name="T17">-Tipificación de Vehículo</text:span><text:span text:style-name="T18">S, AGREGAR tipificación de vehículo botellero. </text:span><text:span text:style-name="T19"><text:s text:c="2"/></text:span><text:span text:style-name="T20">(Pendiente de Juan)</text:span><text:line-break/>- Matriz de Pequeños Evento; <text:span text:style-name="T15">en “Asegurado acepta hacerlo por pequeños eventos:”, agregar esta alerta: </text:span><text:a xlink:type="simple" xlink:href="https://nik.grupokonecta.co:7070/#/app/articles/70527:~:text=Procedimiento%20MAXPAR,en%20Abra%20Ya" text:style-name="Internet_20_link" text:visited-style-name="Visited_20_Internet_20_Link"><text:span text:style-name="T21">https://nik.grupokonecta.co:7070/#/app/articles/70527:~:text=Procedimiento%20MAXPAR,en%20Abra%20Ya</text:span></text:a><text:span text:style-name="T21">). <text:s text:c="2"/></text:span><text:span text:style-name="T15">(Pendiente de Juan)</text:span></text:p>
      <text:p text:style-name="P30"/>
      <text:p text:style-name="P30">----------------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3">#################################</text:p>
      <text:p text:style-name="P32"/>
      <text:p text:style-name="P34">PENDIENTES:</text:p>
      <text:p text:style-name="P32">Indemnizaciones:</text:p>
      <text:p text:style-name="P32">Flujo de estado de reclamación, vehiculo de reemplazo sería dinámico</text:p>
      <text:p text:style-name="P35"/>
      <text:p text:style-name="P32">Coordinación y Finalización:</text:p>
      <text:p text:style-name="P32">Tabla de distancia</text:p>
      <text:p text:style-name="P32">Cruce de zonas</text:p>
      <text:p text:style-name="P36"><text:tab/></text:p>
      <text:p text:style-name="P37">#################################</text:p>
      <text:p text:style-name="P38"/>
      <text:p text:style-name="P39"/>
      <text:p text:style-name="P40"/>
      <text:p text:style-name="P40"/>
      <text:p text:style-name="P40"/>
      <text:p text:style-name="P40">#################################</text:p>
      <text:p text:style-name="P40">PALETA DE COLORES DE LA PÁGINA</text:p>
      <text:p text:style-name="P40">Azul claro: 2d6df6</text:p>
      <text:p text:style-name="P40">Azul oscuro: 0033a0</text:p>
      <text:p text:style-name="P40">Amarillo: e3e829</text:p>
      <text:p text:style-name="P40">Cian: 01b7cd</text:p>
      <text:p text:style-name="P40">Rojo alerta: ff0000 </text:p>
      <text:p text:style-name="P40">Tamaño y color de letra alertas: Blanca, 20px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cm" fo:page-height="599.999cm" style:num-format="1" style:print-orientation="portrait" fo:margin-top="0cm" fo:margin-bottom="0cm" fo:margin-left="0cm" fo:margin-right="0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300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21:42:40.168772000</meta:creation-date>
    <dc:date>2026-07-08T20:49:29.405609900</dc:date>
    <meta:editing-duration>P3DT4H56M18S</meta:editing-duration>
    <meta:editing-cycles>42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24" meta:word-count="623" meta:character-count="4724" meta:non-whitespace-character-count="4198"/>
  </office:meta>
</office:document-meta>
</file>