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020ef8d" officeooo:paragraph-rsid="069535a3" style:font-size-asian="15pt" style:font-size-complex="15pt"/>
    </style:style>
    <style:style style:name="P2" style:family="paragraph" style:parent-style-name="Standard">
      <style:paragraph-properties fo:line-height="115%"/>
      <style:text-properties fo:font-size="15pt" officeooo:rsid="0020ef8d" officeooo:paragraph-rsid="06a04fce" style:font-size-asian="15pt" style:font-size-complex="15pt"/>
    </style:style>
    <style:style style:name="P3" style:family="paragraph" style:parent-style-name="Standard">
      <style:paragraph-properties fo:line-height="115%"/>
      <style:text-properties fo:font-size="15pt" fo:font-weight="bold" officeooo:rsid="041ea8c0" officeooo:paragraph-rsid="06a04fce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15%"/>
      <style:text-properties fo:font-size="15pt" fo:font-weight="bold" officeooo:rsid="041d4e41" officeooo:paragraph-rsid="06a04fce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3f597a" officeooo:paragraph-rsid="06a40802" style:font-size-asian="15pt" style:font-size-complex="15pt"/>
    </style:style>
    <style:style style:name="P6" style:family="paragraph" style:parent-style-name="Standard">
      <style:paragraph-properties fo:line-height="115%"/>
      <style:text-properties fo:font-size="15pt" officeooo:rsid="0020ef8d" officeooo:paragraph-rsid="06a40802" style:font-size-asian="15pt" style:font-size-complex="15pt"/>
    </style:style>
    <style:style style:name="P7" style:family="paragraph" style:parent-style-name="Standard">
      <style:paragraph-properties fo:line-height="115%"/>
      <style:text-properties fo:font-size="15pt" officeooo:rsid="041e1022" officeooo:paragraph-rsid="06a40802" style:font-size-asian="15pt" style:font-size-complex="15pt"/>
    </style:style>
    <style:style style:name="P8" style:family="paragraph" style:parent-style-name="Standard">
      <style:paragraph-properties fo:line-height="115%"/>
      <style:text-properties fo:font-size="15pt" fo:font-weight="bold" officeooo:rsid="042028ee" officeooo:paragraph-rsid="06a04fce" style:font-size-asian="15pt" style:font-weight-asian="bold" style:font-size-complex="15pt" style:font-weight-complex="bold"/>
    </style:style>
    <style:style style:name="P9" style:family="paragraph" style:parent-style-name="Standard">
      <style:paragraph-properties fo:line-height="115%"/>
      <style:text-properties fo:font-size="15pt" fo:font-weight="bold" officeooo:rsid="042778c0" officeooo:paragraph-rsid="06a04fce" style:font-size-asian="15pt" style:font-weight-asian="bold" style:font-size-complex="15pt" style:font-weight-complex="bold"/>
    </style:style>
    <style:style style:name="P10" style:family="paragraph" style:parent-style-name="Standard">
      <style:paragraph-properties fo:line-height="115%"/>
      <style:text-properties fo:font-size="15pt" fo:font-weight="normal" officeooo:rsid="041d4e41" officeooo:paragraph-rsid="06a04fce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line-height="115%"/>
      <style:text-properties fo:font-size="15pt" fo:font-weight="bold" officeooo:rsid="04291276" officeooo:paragraph-rsid="06a04fc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line-height="115%"/>
      <style:text-properties fo:font-size="15pt" fo:font-weight="normal" officeooo:rsid="04291276" officeooo:paragraph-rsid="06a04fce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line-height="115%"/>
      <style:text-properties fo:font-size="15pt" officeooo:rsid="041d4e41" officeooo:paragraph-rsid="06a04fce" style:font-size-asian="15pt" style:font-size-complex="15pt"/>
    </style:style>
    <style:style style:name="P14" style:family="paragraph" style:parent-style-name="Standard">
      <style:paragraph-properties fo:line-height="115%"/>
      <style:text-properties fo:font-size="15pt" fo:font-weight="bold" officeooo:rsid="041e1022" officeooo:paragraph-rsid="06a04fce" style:font-size-asian="15pt" style:font-weight-asian="bold" style:font-size-complex="15pt" style:font-weight-complex="bold"/>
    </style:style>
    <style:style style:name="P15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20pt" fo:font-weight="bold" officeooo:rsid="069535a3" officeooo:paragraph-rsid="069535a3" style:font-size-asian="20pt" style:font-weight-asian="bold" style:font-size-complex="20pt" style:font-weight-complex="bold"/>
    </style:style>
    <style:style style:name="P16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3f597a" officeooo:paragraph-rsid="063f597a" style:font-size-asian="15pt" style:font-size-complex="15pt"/>
    </style:style>
    <style:style style:name="P17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93e6d0" officeooo:paragraph-rsid="0693e6d0" style:font-size-asian="15pt" style:font-size-complex="15pt"/>
    </style:style>
    <style:style style:name="P18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90baa3" officeooo:paragraph-rsid="0690baa3" style:font-size-asian="15pt" style:font-size-complex="15pt"/>
    </style:style>
    <style:style style:name="P19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320050" style:font-size-asian="15pt" style:font-size-complex="15pt"/>
    </style:style>
    <style:style style:name="P20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3e8f42" officeooo:paragraph-rsid="063e8f42" style:font-size-asian="15pt" style:font-size-complex="15pt"/>
    </style:style>
    <style:style style:name="P21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320050" officeooo:paragraph-rsid="0633aceb" style:font-size-asian="15pt" style:font-size-complex="15pt"/>
    </style:style>
    <style:style style:name="P22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5dc23" style:font-size-asian="15pt" style:font-size-complex="15pt"/>
    </style:style>
    <style:style style:name="P23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5dc23" officeooo:paragraph-rsid="0632d7df" style:font-size-asian="15pt" style:font-size-complex="15pt"/>
    </style:style>
    <style:style style:name="P24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fo:font-weight="bold" officeooo:rsid="05e5dc23" style:font-size-asian="15pt" style:font-weight-asian="bold" style:font-size-complex="15pt" style:font-weight-complex="bold"/>
    </style:style>
    <style:style style:name="P25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fcbb05" officeooo:paragraph-rsid="05fcbb05" style:font-size-asian="15pt" style:font-size-complex="15pt"/>
    </style:style>
    <style:style style:name="P26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012c46" officeooo:paragraph-rsid="06012c46" style:font-size-asian="15pt" style:font-size-complex="15pt"/>
    </style:style>
    <style:style style:name="P27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fo:font-weight="bold" officeooo:rsid="05e5eb64" officeooo:paragraph-rsid="05e5eb64" style:font-size-asian="15pt" style:font-weight-asian="bold" style:font-size-complex="15pt" style:font-weight-complex="bold"/>
    </style:style>
    <style:style style:name="P28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5eb64" officeooo:paragraph-rsid="05e5eb64" style:font-size-asian="15pt" style:font-size-complex="15pt"/>
    </style:style>
    <style:style style:name="P29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7a3a4" officeooo:paragraph-rsid="05e7a3a4" style:font-size-asian="15pt" style:font-size-complex="15pt"/>
    </style:style>
    <style:style style:name="P30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c2ed89" style:font-size-asian="15pt" style:font-size-complex="15pt"/>
    </style:style>
    <style:style style:name="P31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e97146" style:font-size-asian="15pt" style:font-size-complex="15pt"/>
    </style:style>
    <style:style style:name="P32" style:family="paragraph" style:parent-style-name="Standard">
      <style:paragraph-properties fo:line-height="115%" fo:break-before="page">
        <style:tab-stops>
          <style:tab-stop style:position="5.891cm"/>
        </style:tab-stops>
      </style:paragraph-properties>
      <style:text-properties fo:font-size="15pt" officeooo:rsid="0585252b" officeooo:paragraph-rsid="05e97146" style:font-size-asian="15pt" style:font-size-complex="15pt"/>
    </style:style>
    <style:style style:name="P33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ea377d" style:font-size-asian="15pt" style:font-size-complex="15pt"/>
    </style:style>
    <style:style style:name="P34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ea5b8c" style:font-size-asian="15pt" style:font-size-complex="15pt"/>
    </style:style>
    <style:style style:name="P35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cf7c8" officeooo:paragraph-rsid="05ecf7c8" style:font-size-asian="15pt" style:font-size-complex="15pt"/>
    </style:style>
    <style:style style:name="P36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f91ad" officeooo:paragraph-rsid="05ef91ad" style:font-size-asian="15pt" style:font-size-complex="15pt"/>
    </style:style>
    <style:style style:name="P37" style:family="paragraph" style:parent-style-name="Text_20_body">
      <style:paragraph-properties>
        <style:tab-stops>
          <style:tab-stop style:position="5.891cm"/>
        </style:tab-stops>
      </style:paragraph-properties>
      <style:text-properties fo:font-size="15pt" officeooo:rsid="05c0aa44" officeooo:paragraph-rsid="05c1f1e0" style:font-size-asian="15pt" style:font-size-complex="15pt"/>
    </style:style>
    <style:style style:name="P38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8cdc91" style:font-size-asian="15pt" style:font-size-complex="15pt"/>
    </style:style>
    <style:style style:name="P39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bc60a4" officeooo:paragraph-rsid="059a93a2" style:font-size-asian="15pt" style:font-size-complex="15pt"/>
    </style:style>
    <style:style style:name="P40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85252b" style:font-size-asian="15pt" style:font-size-complex="15pt"/>
    </style:style>
    <style:style style:name="P41" style:family="paragraph" style:parent-style-name="Standard">
      <style:paragraph-properties fo:line-height="115%"/>
      <style:text-properties fo:font-size="15pt" officeooo:rsid="0429c47b" officeooo:paragraph-rsid="05894687" style:font-size-asian="15pt" style:font-size-complex="15pt"/>
    </style:style>
    <style:style style:name="P42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94687" officeooo:paragraph-rsid="05894687" style:font-size-asian="15pt" style:font-size-complex="15pt"/>
    </style:style>
    <style:style style:name="P43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7d9bbb" officeooo:paragraph-rsid="0585252b" style:font-size-asian="15pt" style:font-size-complex="15pt"/>
    </style:style>
    <style:style style:name="P44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7d9bbb" officeooo:paragraph-rsid="057d9bbb" style:font-size-asian="15pt" style:font-size-complex="15pt"/>
    </style:style>
    <style:style style:name="P45" style:family="paragraph" style:parent-style-name="Standard">
      <style:paragraph-properties fo:line-height="115%"/>
      <style:text-properties fo:font-size="15pt" officeooo:rsid="0429c47b" officeooo:paragraph-rsid="055f0531" style:font-size-asian="15pt" style:font-size-complex="15pt"/>
    </style:style>
    <style:style style:name="P46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770e05" officeooo:paragraph-rsid="053eb342" style:font-size-asian="15pt" style:font-size-complex="15pt"/>
    </style:style>
    <style:style style:name="P47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429c47b" officeooo:paragraph-rsid="053eb342" style:font-size-asian="15pt" style:font-size-complex="15pt"/>
    </style:style>
    <style:style style:name="P48" style:family="paragraph" style:parent-style-name="Standard">
      <style:paragraph-properties fo:line-height="115%"/>
      <style:text-properties fo:font-size="15pt" officeooo:rsid="0429c47b" officeooo:paragraph-rsid="041df43a" style:font-size-asian="15pt" style:font-size-complex="15pt"/>
    </style:style>
    <style:style style:name="T1" style:family="text">
      <style:text-properties officeooo:rsid="0432fe93"/>
    </style:style>
    <style:style style:name="T2" style:family="text">
      <style:text-properties officeooo:rsid="042a90ac"/>
    </style:style>
    <style:style style:name="T3" style:family="text">
      <style:text-properties fo:font-weight="bold" officeooo:rsid="0432fe93" style:font-weight-asian="bold" style:font-weight-complex="bold"/>
    </style:style>
    <style:style style:name="T4" style:family="text">
      <style:text-properties fo:font-weight="bold" officeooo:rsid="042a90ac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4258188"/>
    </style:style>
    <style:style style:name="T7" style:family="text">
      <style:text-properties officeooo:rsid="06329d83"/>
    </style:style>
    <style:style style:name="T8" style:family="text">
      <style:text-properties officeooo:rsid="06a35bbc"/>
    </style:style>
    <style:style style:name="T9" style:family="text">
      <style:text-properties officeooo:rsid="05e79f3b"/>
    </style:style>
    <style:style style:name="T10" style:family="text">
      <style:text-properties officeooo:rsid="05e7a3a4"/>
    </style:style>
    <style:style style:name="T11" style:family="text">
      <style:text-properties officeooo:rsid="05e97146"/>
    </style:style>
    <style:style style:name="T12" style:family="text">
      <style:text-properties officeooo:rsid="05ea377d"/>
    </style:style>
    <style:style style:name="T13" style:family="text">
      <style:text-properties officeooo:rsid="05ea5b8c"/>
    </style:style>
    <style:style style:name="T14" style:family="text">
      <style:text-properties officeooo:rsid="05ec2ff6"/>
    </style:style>
    <style:style style:name="T15" style:family="text">
      <style:text-properties officeooo:rsid="05ecf7c8"/>
    </style:style>
    <style:style style:name="T16" style:family="text">
      <style:text-properties officeooo:rsid="05ed794e"/>
    </style:style>
    <style:style style:name="T17" style:family="text">
      <style:text-properties officeooo:rsid="05c2ed89"/>
    </style:style>
    <style:style style:name="T18" style:family="text">
      <style:text-properties officeooo:rsid="05c1f1e0"/>
    </style:style>
    <style:style style:name="T19" style:family="text">
      <style:text-properties officeooo:rsid="05c0e0cd"/>
    </style:style>
    <style:style style:name="T20" style:family="text">
      <style:text-properties fo:font-variant="normal" fo:text-transform="none" fo:color="#2d6df6" loext:opacity="100%" fo:font-family="Arial, sans-serif" fo:letter-spacing="normal" fo:font-style="normal" fo:font-weight="normal"/>
    </style:style>
    <style:style style:name="T21" style:family="text">
      <style:text-properties fo:font-variant="normal" fo:text-transform="none" fo:color="#2d6df6" loext:opacity="100%" fo:font-family="Arial, sans-serif" fo:letter-spacing="normal" fo:font-style="normal" fo:font-weight="normal" officeooo:rsid="05c0e0cd"/>
    </style:style>
    <style:style style:name="T22" style:family="text">
      <style:text-properties fo:font-variant="normal" fo:text-transform="none" fo:color="#2d6df6" loext:opacity="100%" fo:font-family="Arial, sans-serif" fo:letter-spacing="normal" fo:font-style="normal" fo:font-weight="normal" officeooo:rsid="0585252b"/>
    </style:style>
    <style:style style:name="T23" style:family="text">
      <style:text-properties fo:font-variant="normal" fo:text-transform="none" fo:color="#2d6df6" loext:opacity="100%" fo:font-family="Arial, sans-serif" fo:letter-spacing="normal" fo:font-style="normal" fo:font-weight="normal" officeooo:rsid="05c1f1e0"/>
    </style:style>
    <style:style style:name="T24" style:family="text">
      <style:text-properties officeooo:rsid="058525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text:span text:style-name="T1">7</text:span><text:span text:style-name="T2">. </text:span>INTEGRAR TABLA DE DISTANCIA DESDE OTRO ARCHIVO, PARA QUE ACTUALIZA RÁPIDO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/>
      <text:p text:style-name="P7"><text:span text:style-name="T3">8</text:span><text:span text:style-name="T4">. </text:span><text:span text:style-name="T5">ACTUALIZAR TABLA DE DISTANCIA EN LAS CALCULADORAS DE COSTO SURA</text:span></text:p>
      <text:p text:style-name="P6">https://nik.grupokonecta.co:7070/#/app/articles/18540</text:p>
      <text:p text:style-name="P6"/>
      <text:p text:style-name="P6"/>
      <text:p text:style-name="P4"/>
      <text:p text:style-name="P4"/>
      <text:p text:style-name="P8"><text:span text:style-name="T1">6</text:span><text:span text:style-name="T2">. </text:span>COMENTARIOS DE GOOGLE FORM</text:p>
      <text:p text:style-name="P4"/>
      <text:p text:style-name="P4"/>
      <text:p text:style-name="P4"/>
      <text:p text:style-name="P4"><text:span text:style-name="T1">5</text:span><text:span text:style-name="T2">. </text:span>Reporte de Retraso: <text:span text:style-name="T6">AGREGAR EN LA LISTA: OTRO <text:s/>PARA CAMPO ABIERTO</text:span></text:p>
      <text:p text:style-name="P9"/>
      <text:p text:style-name="P4"/>
      <text:p text:style-name="P9"><text:span text:style-name="T1">4</text:span><text:span text:style-name="T2">. </text:span>GENERAR UN ARTICULO DE REPORTE DE <text:s/>RETRASO: </text:p>
      <text:p text:style-name="P10">https://nik.grupokonecta.co:7070/#/app/articles/69531:~:text=retrasos%20e%20incompletas-,Retraso%20Menor%20a%2030%20minutos,-Despu%C3%A9s%20de%20haber</text:p>
      <text:p text:style-name="P4"/>
      <text:p text:style-name="P4"/>
      <text:p text:style-name="P4"/>
      <text:p text:style-name="P4"/>
      <text:p text:style-name="P11"><text:span text:style-name="T1">3</text:span><text:span text:style-name="T2">. </text:span>AGREGAR IMAGENES EN MATRIZ DE PEQUEÑOS EVENTOS</text:p>
      <text:p text:style-name="P12">"\\SM1FIL01W16S\ope_allus\Suramericana\Asesores\Asistencia\Asesores Lineas Sura\Autos\Jaime Rafael Sequera Torrealba\Proyecto\Indemnizaciones\Partes del vh.odt"</text:p>
      <text:p text:style-name="P4"/>
      <text:p text:style-name="P4"/>
      <text:p text:style-name="P4"/>
      <text:p text:style-name="P4"/>
      <text:p text:style-name="P4"><text:span text:style-name="T1">2</text:span><text:span text:style-name="T2">. </text:span>VINCULAR MAPAS CON GOOGLE MAPS.</text:p>
      <text:p text:style-name="P13"/>
      <text:p text:style-name="P13"/>
      <text:p text:style-name="P13"/>
      <text:p text:style-name="P13"/>
      <text:p text:style-name="P14"><text:span text:style-name="T1">1</text:span><text:span text:style-name="T2">. </text:span>ACTUALIZAR TIPIFICACIÓN DE VH</text:p>
      <text:p text:style-name="P2"/>
      <text:p text:style-name="P2"/>
      <text:p text:style-name="P2"/>
      <text:p text:style-name="P15"/>
      <text:p text:style-name="P15"/>
      <text:p text:style-name="P15">REVISAR SUGERENCIAS</text:p>
      <text:p text:style-name="P16"/>
      <text:p text:style-name="P16"/>
      <text:p text:style-name="P16"/>
      <text:p text:style-name="P16"/>
      <text:p text:style-name="P16"/>
      <text:p text:style-name="P16"/>
      <text:p text:style-name="P16">#################################</text:p>
      <text:p text:style-name="P16"/>
      <text:p text:style-name="P17">PENDIENTE DE JUAN PASAR EL LISTADO DE TALLERES DE PESADOS</text:p>
      <text:p text:style-name="P16"/>
      <text:p text:style-name="P18">PENDIENTE VALIDAR HASTA DONDE CUBRE CARTAGO Y PEREIRA</text:p>
      <text:p text:style-name="P16"/>
      <text:p text:style-name="P16">#################################</text:p>
      <text:p text:style-name="P16">No modificar este estado, ya que es automático.</text:p>
      <text:p text:style-name="P16">Tipo de transición: Automática: Color Naranja</text:p>
      <text:p text:style-name="P16"/>
      <text:p text:style-name="P19">----------------..</text:p>
      <text:p text:style-name="P19">&lt;p style="margin: 4px 0; background-color: orange;"&gt;&lt;strong&gt;⚙️ Tipo de transición:&lt;/strong&gt; Automática 🤖&lt;/p&gt;</text:p>
      <text:p text:style-name="P19">#################################</text:p>
      <text:p text:style-name="P20">FLUJOS DE ESTADO</text:p>
      <text:p text:style-name="P20"/>
      <text:p text:style-name="P21"><text:s text:c="20"/>&lt;div style="margin-top: 8px; padding-top: 6px; border-top: 1px solid #eee; font-size: 15px; color: #000000;"&gt;</text:p>
      <text:p text:style-name="P22"/>
      <text:p text:style-name="P23">#################################</text:p>
      <text:p text:style-name="P24">Guiones</text:p>
      <text:p text:style-name="P25">Agregar guión cuando se recibe grúa pesado</text:p>
      <text:p text:style-name="P22"/>
      <text:p text:style-name="P22"/>
      <text:p text:style-name="P22"/>
      <text:p text:style-name="P22">#################################</text:p>
      <text:p text:style-name="P26">Gestión Cierre de Bloqueo</text:p>
      <text:p text:style-name="P26">Validar con Nora Sanchez y Manuela Grisales</text:p>
      <text:p text:style-name="P22">#################################</text:p>
      <text:p text:style-name="P22"/>
      <text:p text:style-name="P22"/>
      <text:p text:style-name="P22">Ya se utilizó:</text:p>
      <text:p text:style-name="P22">V<text:span text:style-name="T7">7</text:span><text:span text:style-name="T8">8</text:span></text:p>
      <text:p text:style-name="P22"/>
      <text:p text:style-name="P22"/>
      <text:p text:style-name="P22">#################################</text:p>
      <text:p text:style-name="P22"/>
      <text:p text:style-name="P22"/>
      <text:p text:style-name="P22"/>
      <text:p text:style-name="P22"/>
      <text:p text:style-name="P22">#################################</text:p>
      <text:p text:style-name="P22"/>
      <text:p text:style-name="P22"/>
      <text:p text:style-name="P22"/>
      <text:p text:style-name="P22"/>
      <text:p text:style-name="P22">#################################</text:p>
      <text:p text:style-name="P22"/>
      <text:p text:style-name="P22"/>
      <text:p text:style-name="P22"/>
      <text:p text:style-name="P22"/>
      <text:p text:style-name="P22">#################################</text:p>
      <text:p text:style-name="P22"/>
      <text:p text:style-name="P22"/>
      <text:p text:style-name="P22"/>
      <text:p text:style-name="P22"/>
      <text:p text:style-name="P22">#################################</text:p>
      <text:p text:style-name="P22"/>
      <text:p text:style-name="P22"/>
      <text:p text:style-name="P22"/>
      <text:p text:style-name="P22"/>
      <text:p text:style-name="P22"/>
      <text:p text:style-name="P22">#################################</text:p>
      <text:p text:style-name="P27">Errores en la tabla de distancia:</text:p>
      <text:p text:style-name="P28">- Medellín está muchas veces escrita mal y al reves como en antioquia.</text:p>
      <text:p text:style-name="P28">- Bogotá está mal escrito duplicado.</text:p>
      <text:p text:style-name="P28">- Cúcuta, Está duplicado.</text:p>
      <text:p text:style-name="P28">- Cali, está mal escrita muchas veces.</text:p>
      <text:p text:style-name="P28">- Barrancabermeja, está duplicado.</text:p>
      <text:p text:style-name="P28">- Cartago, duplicado.</text:p>
      <text:p text:style-name="P28">- <text:span text:style-name="T9">Bucaramanga, muchas veces.</text:span></text:p>
      <text:p text:style-name="P28">- <text:span text:style-name="T9">Pereira, duplicado</text:span></text:p>
      <text:p text:style-name="P28">- <text:span text:style-name="T9">Bello, duplicado.</text:span></text:p>
      <text:p text:style-name="P28">- <text:span text:style-name="T10">Ibagué, está con otro departamento y al reves como departamento</text:span></text:p>
      <text:p text:style-name="P28">- <text:span text:style-name="T10">Santa Marta, al reves como departamento</text:span></text:p>
      <text:p text:style-name="P28">- <text:span text:style-name="T10">Manizales, al reves como departamento y duplicado.</text:span></text:p>
      <text:p text:style-name="P28">- <text:span text:style-name="T10">Buenaventura, mal escrito</text:span></text:p>
      <text:p text:style-name="P28">- <text:span text:style-name="T10">Villavicencio, duplicado y con otro departamento.</text:span></text:p>
      <text:p text:style-name="P28">- <text:span text:style-name="T10">Pasto, repetido.</text:span></text:p>
      <text:p text:style-name="P28">- <text:span text:style-name="T10">Montería, repetido</text:span></text:p>
      <text:p text:style-name="P28">- <text:span text:style-name="T10">Neiva, repetido</text:span></text:p>
      <text:p text:style-name="P29">- Armenia, como departamento.</text:p>
      <text:p text:style-name="P29">- Sincelejo, como departamento.</text:p>
      <text:p text:style-name="P29">- Chia, repetido</text:p>
      <text:p text:style-name="P30">- <text:span text:style-name="T11">Buga, debe decir el nombre del departamento completo y como guadalajara de buga</text:span></text:p>
      <text:p text:style-name="P30">- <text:span text:style-name="T11">Bugalagrande, con espacio</text:span></text:p>
      <text:p text:style-name="P30">- <text:span text:style-name="T11">Buenaventura, debe decir el nombre del departamento completo</text:span></text:p>
      <text:p text:style-name="P31">- <text:span text:style-name="T11">Palmira, debe decir el nombre del departamento completo</text:span></text:p>
      <text:p text:style-name="P31">- <text:span text:style-name="T11">Tulua, debe decir el nombre del departamento completo</text:span></text:p>
      <text:p text:style-name="P31">- <text:span text:style-name="T11">Alcala, debe decir el nombre del departamento completo</text:span></text:p>
      <text:p text:style-name="P31">- <text:span text:style-name="T11">Andalucia, debe decir el nombre del departamento completo</text:span></text:p>
      <text:p text:style-name="P31">- <text:span text:style-name="T12">Caicedonia</text:span><text:span text:style-name="T11">, debe decir el nombre del departamento completo </text:span><text:span text:style-name="T12">y repetido</text:span></text:p>
      <text:p text:style-name="P31">- <text:span text:style-name="T12">Jamundi</text:span><text:span text:style-name="T11">, debe decir el nombre del departamento completo</text:span></text:p>
      <text:p text:style-name="P32">- <text:span text:style-name="T12">Guacari</text:span><text:span text:style-name="T11">, debe decir el nombre del departamento completo</text:span></text:p>
      <text:p text:style-name="P33">- <text:span text:style-name="T12">Cerrito</text:span><text:span text:style-name="T11">, debe decir el nombre del departamento completo</text:span></text:p>
      <text:p text:style-name="P33">- <text:span text:style-name="T12">Sevilla</text:span><text:span text:style-name="T11">, debe decir el nombre del departamento completo</text:span></text:p>
      <text:p text:style-name="P33">- S<text:span text:style-name="T12">tder de quilichao</text:span><text:span text:style-name="T11">, debe decir el nombre del departamento completo</text:span></text:p>
      <text:p text:style-name="P34">- <text:span text:style-name="T13">Vijes</text:span><text:span text:style-name="T11">, debe decir el nombre del departamento completo</text:span></text:p>
      <text:p text:style-name="P33">- <text:span text:style-name="T13">Yocoto</text:span><text:span text:style-name="T11">, debe decir el nombre del departamento completo</text:span></text:p>
      <text:p text:style-name="P33">- <text:span text:style-name="T13">Yumbo</text:span><text:span text:style-name="T11">, debe decir el nombre del departamento completo</text:span></text:p>
      <text:p text:style-name="P34">- <text:span text:style-name="T13">Zarzal</text:span><text:span text:style-name="T11">, debe decir el nombre del departamento completo</text:span></text:p>
      <text:p text:style-name="P34">- <text:span text:style-name="T14">Riohacha, repetido</text:span></text:p>
      <text:p text:style-name="P34">- <text:span text:style-name="T14">Popayan, refleja uno como departamento</text:span></text:p>
      <text:p text:style-name="P34">- <text:span text:style-name="T14">Tunja, repetido y como departamento</text:span></text:p>
      <text:p text:style-name="P34">- <text:span text:style-name="T14">Sahagun, como departamento</text:span></text:p>
      <text:p text:style-name="P34">- Florencia, <text:span text:style-name="T14">repetido y como departamento</text:span></text:p>
      <text:p text:style-name="P34">- Yopal, <text:span text:style-name="T14">repetido</text:span></text:p>
      <text:p text:style-name="P34">- Ipiales, <text:span text:style-name="T14">repetido</text:span></text:p>
      <text:p text:style-name="P34">- Fusagasug<text:span text:style-name="T14">a, repetido</text:span></text:p>
      <text:p text:style-name="P34">- <text:span text:style-name="T15">Pitalito, repetido</text:span></text:p>
      <text:p text:style-name="P35">- Sogamoso, repetido</text:p>
      <text:p text:style-name="P34">- <text:span text:style-name="T15">Quibdo, repetido</text:span></text:p>
      <text:p text:style-name="P34">- Duitama, <text:span text:style-name="T15">repetido</text:span></text:p>
      <text:p text:style-name="P34">- <text:span text:style-name="T15">Tame, repetido</text:span></text:p>
      <text:p text:style-name="P34">- Girardot, <text:span text:style-name="T15">repetido y con otro departamento</text:span></text:p>
      <text:p text:style-name="P34">- Ci<text:span text:style-name="T15">e</text:span>naga de Oro, <text:span text:style-name="T15">repetido</text:span></text:p>
      <text:p text:style-name="P34">- <text:span text:style-name="T15">Cienaga, como departamento.</text:span></text:p>
      <text:p text:style-name="P34">- Montel<text:span text:style-name="T15">i</text:span>bano, <text:span text:style-name="T15">repetido</text:span></text:p>
      <text:p text:style-name="P34">- <text:span text:style-name="T15">Maicao, repetido</text:span></text:p>
      <text:p text:style-name="P34">- Zipaquir<text:span text:style-name="T15">a, repetido</text:span></text:p>
      <text:p text:style-name="P34">- Facatativá, <text:span text:style-name="T16">repetido</text:span></text:p>
      <text:p text:style-name="P30"/>
      <text:p text:style-name="P30">----------------</text:p>
      <text:p text:style-name="P36">SUGERENCIA:</text:p>
      <text:p text:style-name="P30">Grúa: Asistencia Vehículos Pesados y Utilitarios Pesados</text:p>
      <text:p text:style-name="P30">Excedente Km:</text:p>
      <text:p text:style-name="P30">Andres Delgado</text:p>
      <text:p text:style-name="P30">Nota de valor de 150.000 pesos se cobra excedente</text:p>
      <text:p text:style-name="P30"/>
      <text:p text:style-name="P30">----------------</text:p>
      <text:p text:style-name="P30">- Matriz de Pequeños Eventos: <text:s/><text:span text:style-name="T17">Agregar partes el vh en imagenes señaladas. (Pendiente de Juan)</text:span></text:p>
      <text:p text:style-name="P37">-Crear articulo: Contingencia de Aplicativos. <text:a xlink:type="simple" xlink:href="https://nik.grupokonecta.co:7070/#/app/articles/18274" text:style-name="Internet_20_link" text:visited-style-name="Visited_20_Internet_20_Link">https://nik.grupokonecta.co:7070/#/app/articles/18274</text:a> <text:span text:style-name="T18">(Pendiente de Juan)</text:span></text:p>
      <text:p text:style-name="P37">-Crear artículo: Geocerca de Movilidad Flexible <text:span text:style-name="T18">(Pendiente de Juan)</text:span></text:p>
      <text:p text:style-name="P37">- <text:span text:style-name="T19">Crear Artículo: Guias de Objeción: </text:span><text:a xlink:type="simple" xlink:href="https://nik.grupokonecta.co:7070/#/app/articles/38211" text:style-name="Internet_20_link" text:visited-style-name="Visited_20_Internet_20_Link"><text:span text:style-name="T19">https://nik.grupokonecta.co:7070/#/app/articles/38211</text:span></text:a><text:span text:style-name="T19"> </text:span><text:span text:style-name="T18">(Pendiente de Juan)</text:span></text:p>
      <text:p text:style-name="P37"><text:span text:style-name="T20">-Tipificación de Vehículo</text:span><text:span text:style-name="T21">S, AGREGAR tipificación de vehículo botellero. </text:span><text:span text:style-name="T22"><text:s text:c="2"/></text:span><text:span text:style-name="T23">(Pendiente de Juan)</text:span><text:line-break/>- Matriz de Pequeños Evento; <text:span text:style-name="T18">en “Asegurado acepta hacerlo por pequeños eventos:”, agregar esta alerta: </text:span><text:a xlink:type="simple" xlink:href="https://nik.grupokonecta.co:7070/#/app/articles/70527:~:text=Procedimiento%20MAXPAR,en%20Abra%20Ya" text:style-name="Internet_20_link" text:visited-style-name="Visited_20_Internet_20_Link"><text:span text:style-name="T24">https://nik.grupokonecta.co:7070/#/app/articles/70527:~:text=Procedimiento%20MAXPAR,en%20Abra%20Ya</text:span></text:a><text:span text:style-name="T24">). <text:s text:c="2"/></text:span><text:span text:style-name="T18">(Pendiente de Juan)</text:span></text:p>
      <text:p text:style-name="P38"/>
      <text:p text:style-name="P38">----------------</text:p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/>
      <text:p text:style-name="P41">#################################</text:p>
      <text:p text:style-name="P40"/>
      <text:p text:style-name="P42">PENDIENTES:</text:p>
      <text:p text:style-name="P40">Indemnizaciones:</text:p>
      <text:p text:style-name="P40">Flujo de estado de reclamación, vehiculo de reemplazo sería dinámico</text:p>
      <text:p text:style-name="P43"/>
      <text:p text:style-name="P40">Coordinación y Finalización:</text:p>
      <text:p text:style-name="P40">Tabla de distancia</text:p>
      <text:p text:style-name="P40">Cruce de zonas</text:p>
      <text:p text:style-name="P44"><text:tab/></text:p>
      <text:p text:style-name="P45">#################################</text:p>
      <text:p text:style-name="P46"/>
      <text:p text:style-name="P47"/>
      <text:p text:style-name="P48"/>
      <text:p text:style-name="P48"/>
      <text:p text:style-name="P48"/>
      <text:p text:style-name="P48">#################################</text:p>
      <text:p text:style-name="P48">PALETA DE COLORES DE LA PÁGINA</text:p>
      <text:p text:style-name="P48">Azul claro: 2d6df6</text:p>
      <text:p text:style-name="P48">Azul oscuro: 0033a0</text:p>
      <text:p text:style-name="P48">Amarillo: e3e829</text:p>
      <text:p text:style-name="P48">Cian: 01b7cd</text:p>
      <text:p text:style-name="P48">Rojo alerta: ff0000 </text:p>
      <text:p text:style-name="P48">Tamaño y color de letra alertas: Blanca, 20px</text:p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cm" fo:page-height="599.999cm" style:num-format="1" style:print-orientation="portrait" fo:margin-top="0cm" fo:margin-bottom="0cm" fo:margin-left="0cm" fo:margin-right="0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cm" fo:page-height="300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8T21:42:40.168772000</meta:creation-date>
    <dc:date>2026-07-07T20:49:57.525480500</dc:date>
    <meta:editing-duration>P3DT3H57M48S</meta:editing-duration>
    <meta:editing-cycles>413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26" meta:word-count="667" meta:character-count="5277" meta:non-whitespace-character-count="4706"/>
  </office:meta>
</office:document-meta>
</file>