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3f597a" officeooo:paragraph-rsid="063f597a" style:font-size-asian="15pt" style:font-size-complex="15pt"/>
    </style:style>
    <style:style style:name="P2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64197d" officeooo:paragraph-rsid="0664197d" style:font-size-asian="15pt" style:font-size-complex="15pt"/>
    </style:style>
    <style:style style:name="P3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63e3a3" officeooo:paragraph-rsid="063f597a" style:font-size-asian="15pt" style:font-size-complex="15pt"/>
    </style:style>
    <style:style style:name="P4" style:family="paragraph" style:parent-style-name="Standard">
      <style:paragraph-properties fo:line-height="115%" style:writing-mode="lr-tb" style:writing-mode-automatic="false">
        <style:tab-stops>
          <style:tab-stop style:position="5.891cm"/>
        </style:tab-stops>
      </style:paragraph-properties>
      <style:text-properties fo:font-size="15pt" officeooo:rsid="063f597a" officeooo:paragraph-rsid="063f597a" style:font-size-asian="15pt" style:font-size-complex="15pt"/>
    </style:style>
    <style:style style:name="P5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320050" style:font-size-asian="15pt" style:font-size-complex="15pt"/>
    </style:style>
    <style:style style:name="P6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3e8f42" officeooo:paragraph-rsid="063e8f42" style:font-size-asian="15pt" style:font-size-complex="15pt"/>
    </style:style>
    <style:style style:name="P7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320050" officeooo:paragraph-rsid="0633aceb" style:font-size-asian="15pt" style:font-size-complex="15pt"/>
    </style:style>
    <style:style style:name="P8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e5dc23" style:font-size-asian="15pt" style:font-size-complex="15pt"/>
    </style:style>
    <style:style style:name="P9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e5dc23" officeooo:paragraph-rsid="0632d7df" style:font-size-asian="15pt" style:font-size-complex="15pt"/>
    </style:style>
    <style:style style:name="P10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fo:font-weight="bold" officeooo:rsid="05e5dc23" style:font-size-asian="15pt" style:font-weight-asian="bold" style:font-size-complex="15pt" style:font-weight-complex="bold"/>
    </style:style>
    <style:style style:name="P11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fcbb05" officeooo:paragraph-rsid="05fcbb05" style:font-size-asian="15pt" style:font-size-complex="15pt"/>
    </style:style>
    <style:style style:name="P12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012c46" officeooo:paragraph-rsid="06012c46" style:font-size-asian="15pt" style:font-size-complex="15pt"/>
    </style:style>
    <style:style style:name="P13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fo:font-weight="bold" officeooo:rsid="05e5eb64" officeooo:paragraph-rsid="05e5eb64" style:font-size-asian="15pt" style:font-weight-asian="bold" style:font-size-complex="15pt" style:font-weight-complex="bold"/>
    </style:style>
    <style:style style:name="P14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e5eb64" officeooo:paragraph-rsid="05e5eb64" style:font-size-asian="15pt" style:font-size-complex="15pt"/>
    </style:style>
    <style:style style:name="P15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e7a3a4" officeooo:paragraph-rsid="05e7a3a4" style:font-size-asian="15pt" style:font-size-complex="15pt"/>
    </style:style>
    <style:style style:name="P16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5252b" officeooo:paragraph-rsid="05c2ed89" style:font-size-asian="15pt" style:font-size-complex="15pt"/>
    </style:style>
    <style:style style:name="P17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5252b" officeooo:paragraph-rsid="05e97146" style:font-size-asian="15pt" style:font-size-complex="15pt"/>
    </style:style>
    <style:style style:name="P18" style:family="paragraph" style:parent-style-name="Standard">
      <style:paragraph-properties fo:line-height="115%" fo:break-before="page">
        <style:tab-stops>
          <style:tab-stop style:position="5.891cm"/>
        </style:tab-stops>
      </style:paragraph-properties>
      <style:text-properties fo:font-size="15pt" officeooo:rsid="0585252b" officeooo:paragraph-rsid="05e97146" style:font-size-asian="15pt" style:font-size-complex="15pt"/>
    </style:style>
    <style:style style:name="P19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5252b" officeooo:paragraph-rsid="05ea377d" style:font-size-asian="15pt" style:font-size-complex="15pt"/>
    </style:style>
    <style:style style:name="P20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5252b" officeooo:paragraph-rsid="05ea5b8c" style:font-size-asian="15pt" style:font-size-complex="15pt"/>
    </style:style>
    <style:style style:name="P21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ecf7c8" officeooo:paragraph-rsid="05ecf7c8" style:font-size-asian="15pt" style:font-size-complex="15pt"/>
    </style:style>
    <style:style style:name="P22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ef91ad" officeooo:paragraph-rsid="05ef91ad" style:font-size-asian="15pt" style:font-size-complex="15pt"/>
    </style:style>
    <style:style style:name="P23" style:family="paragraph" style:parent-style-name="Text_20_body">
      <style:paragraph-properties>
        <style:tab-stops>
          <style:tab-stop style:position="5.891cm"/>
        </style:tab-stops>
      </style:paragraph-properties>
      <style:text-properties fo:font-size="15pt" officeooo:rsid="05c0aa44" officeooo:paragraph-rsid="05c1f1e0" style:font-size-asian="15pt" style:font-size-complex="15pt"/>
    </style:style>
    <style:style style:name="P24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5252b" officeooo:paragraph-rsid="058cdc91" style:font-size-asian="15pt" style:font-size-complex="15pt"/>
    </style:style>
    <style:style style:name="P25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bc60a4" officeooo:paragraph-rsid="059a93a2" style:font-size-asian="15pt" style:font-size-complex="15pt"/>
    </style:style>
    <style:style style:name="P26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5252b" officeooo:paragraph-rsid="0585252b" style:font-size-asian="15pt" style:font-size-complex="15pt"/>
    </style:style>
    <style:style style:name="P27" style:family="paragraph" style:parent-style-name="Standard">
      <style:paragraph-properties fo:line-height="115%"/>
      <style:text-properties fo:font-size="15pt" officeooo:rsid="0429c47b" officeooo:paragraph-rsid="05894687" style:font-size-asian="15pt" style:font-size-complex="15pt"/>
    </style:style>
    <style:style style:name="P28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94687" officeooo:paragraph-rsid="05894687" style:font-size-asian="15pt" style:font-size-complex="15pt"/>
    </style:style>
    <style:style style:name="P29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7d9bbb" officeooo:paragraph-rsid="0585252b" style:font-size-asian="15pt" style:font-size-complex="15pt"/>
    </style:style>
    <style:style style:name="P30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7d9bbb" officeooo:paragraph-rsid="057d9bbb" style:font-size-asian="15pt" style:font-size-complex="15pt"/>
    </style:style>
    <style:style style:name="P31" style:family="paragraph" style:parent-style-name="Standard">
      <style:paragraph-properties fo:line-height="115%"/>
      <style:text-properties fo:font-size="15pt" officeooo:rsid="0429c47b" officeooo:paragraph-rsid="055f0531" style:font-size-asian="15pt" style:font-size-complex="15pt"/>
    </style:style>
    <style:style style:name="P32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770e05" officeooo:paragraph-rsid="053eb342" style:font-size-asian="15pt" style:font-size-complex="15pt"/>
    </style:style>
    <style:style style:name="P33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429c47b" officeooo:paragraph-rsid="053eb342" style:font-size-asian="15pt" style:font-size-complex="15pt"/>
    </style:style>
    <style:style style:name="P34" style:family="paragraph" style:parent-style-name="Standard">
      <style:paragraph-properties fo:line-height="115%"/>
      <style:text-properties fo:font-size="15pt" officeooo:rsid="0429c47b" officeooo:paragraph-rsid="041df43a" style:font-size-asian="15pt" style:font-size-complex="15pt"/>
    </style:style>
    <style:style style:name="T1" style:family="text">
      <style:text-properties officeooo:rsid="0663e3a3"/>
    </style:style>
    <style:style style:name="T2" style:family="text">
      <style:text-properties officeooo:rsid="0664197d"/>
    </style:style>
    <style:style style:name="T3" style:family="text">
      <style:text-properties officeooo:rsid="06329d83"/>
    </style:style>
    <style:style style:name="T4" style:family="text">
      <style:text-properties officeooo:rsid="0653d9f5"/>
    </style:style>
    <style:style style:name="T5" style:family="text">
      <style:text-properties officeooo:rsid="05e79f3b"/>
    </style:style>
    <style:style style:name="T6" style:family="text">
      <style:text-properties officeooo:rsid="05e7a3a4"/>
    </style:style>
    <style:style style:name="T7" style:family="text">
      <style:text-properties officeooo:rsid="05e97146"/>
    </style:style>
    <style:style style:name="T8" style:family="text">
      <style:text-properties officeooo:rsid="05ea377d"/>
    </style:style>
    <style:style style:name="T9" style:family="text">
      <style:text-properties officeooo:rsid="05ea5b8c"/>
    </style:style>
    <style:style style:name="T10" style:family="text">
      <style:text-properties officeooo:rsid="05ec2ff6"/>
    </style:style>
    <style:style style:name="T11" style:family="text">
      <style:text-properties officeooo:rsid="05ecf7c8"/>
    </style:style>
    <style:style style:name="T12" style:family="text">
      <style:text-properties officeooo:rsid="05ed794e"/>
    </style:style>
    <style:style style:name="T13" style:family="text">
      <style:text-properties officeooo:rsid="05c2ed89"/>
    </style:style>
    <style:style style:name="T14" style:family="text">
      <style:text-properties officeooo:rsid="05c1f1e0"/>
    </style:style>
    <style:style style:name="T15" style:family="text">
      <style:text-properties officeooo:rsid="05c0e0cd"/>
    </style:style>
    <style:style style:name="T16" style:family="text">
      <style:text-properties fo:font-variant="normal" fo:text-transform="none" fo:color="#2d6df6" loext:opacity="100%" fo:font-family="Arial, sans-serif" fo:letter-spacing="normal" fo:font-style="normal" fo:font-weight="normal"/>
    </style:style>
    <style:style style:name="T17" style:family="text">
      <style:text-properties fo:font-variant="normal" fo:text-transform="none" fo:color="#2d6df6" loext:opacity="100%" fo:font-family="Arial, sans-serif" fo:letter-spacing="normal" fo:font-style="normal" fo:font-weight="normal" officeooo:rsid="05c0e0cd"/>
    </style:style>
    <style:style style:name="T18" style:family="text">
      <style:text-properties fo:font-variant="normal" fo:text-transform="none" fo:color="#2d6df6" loext:opacity="100%" fo:font-family="Arial, sans-serif" fo:letter-spacing="normal" fo:font-style="normal" fo:font-weight="normal" officeooo:rsid="0585252b"/>
    </style:style>
    <style:style style:name="T19" style:family="text">
      <style:text-properties fo:font-variant="normal" fo:text-transform="none" fo:color="#2d6df6" loext:opacity="100%" fo:font-family="Arial, sans-serif" fo:letter-spacing="normal" fo:font-style="normal" fo:font-weight="normal" officeooo:rsid="05c1f1e0"/>
    </style:style>
    <style:style style:name="T20" style:family="text">
      <style:text-properties officeooo:rsid="058525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#################################</text:p>
      <text:p text:style-name="P1"/>
      <text:p text:style-name="P2">ENLACES DE NIK Para indeminizaciones</text:p>
      <text:p text:style-name="P1"/>
      <text:p text:style-name="P1">- Asignación de Taller - Vehículos Pesados: https://nik.grupokonecta.co:7070/#/app/articles/18287:~:text=Plantilla%20de%20notificaci%C3%B3n,por%20la%20gesti%C3%B3n.</text:p>
      <text:p text:style-name="P3">- Asignación de Taller – Motos: </text:p>
      <text:p text:style-name="P1">- <text:span text:style-name="T1">Todos los</text:span> VXR: https://nik.grupokonecta.co:7070/#/app/articles/18603</text:p>
      <text:p text:style-name="P1">- <text:span text:style-name="T1">Todos los abogados: </text:span><text:a xlink:type="simple" xlink:href="https://nik.grupokonecta.co:7070/#/app/articles/18555" text:style-name="Internet_20_link" text:visited-style-name="Visited_20_Internet_20_Link"><text:span text:style-name="T1">https://nik.grupokonecta.co:7070/#/app/articles/18555</text:span></text:a></text:p>
      <text:p text:style-name="P4">- <text:span text:style-name="T1">Todos los terceros afectados: </text:span><text:a xlink:type="simple" xlink:href="https://nik.grupokonecta.co:7070/#/app/articles/18537" text:style-name="Internet_20_link" text:visited-style-name="Visited_20_Internet_20_Link"><text:span text:style-name="T1">https://nik.grupokonecta.co:7070/#/app/articles/18537</text:span></text:a></text:p>
      <text:p text:style-name="P4">- <text:span text:style-name="T2">Ambos hurto: </text:span><text:a xlink:type="simple" xlink:href="https://nik.grupokonecta.co:7070/#/app/articles/18574" text:style-name="Internet_20_link" text:visited-style-name="Visited_20_Internet_20_Link"><text:span text:style-name="T2">https://nik.grupokonecta.co:7070/#/app/articles/18574</text:span></text:a></text:p>
      <text:p text:style-name="P4">- <text:span text:style-name="T2">Todos los pequeños eventos: </text:span><text:a xlink:type="simple" xlink:href="https://nik.grupokonecta.co:7070/#/app/articles/70527" text:style-name="Internet_20_link" text:visited-style-name="Visited_20_Internet_20_Link"><text:span text:style-name="T2">https://nik.grupokonecta.co:7070/#/app/articles/70527</text:span></text:a></text:p>
      <text:p text:style-name="P4">- <text:span text:style-name="T2">Reclamación Manual, ambos: https://nik.grupokonecta.co:7070/#/app/articles/18610</text:span></text:p>
      <text:p text:style-name="P4">- <text:span text:style-name="T2">Cobertura Mecánica: </text:span>https://nik.grupokonecta.co:7070/#/app/articles/18405</text:p>
      <text:p text:style-name="P1">- <text:span text:style-name="T2">Pólizas Digitales:</text:span> https://nik.grupokonecta.co:7070/#/app/articles/43292:~:text=Orientaci%C3%B3n%20M%C3%A9dica%20Telef%C3%B3nica.-,Gesti%C3%B3n%20de%20reclamaciones%20Motos/Autos%20Digital,-Asignaci%C3%B3n%20de%20taller</text:p>
      <text:p text:style-name="P1">- <text:span text:style-name="T2">Deducibles: https://nik.grupokonecta.co:7070/#/app/articles/76272</text:span></text:p>
      <text:p text:style-name="P1">- Plan Básico con Pérdidas Totales: <text:a xlink:type="simple" xlink:href="https://nik.grupokonecta.co:7070/#/app/articles/57236:~:text=póliza%20básica.-,Procedimiento%20en%20la%20toma%20de%20reclamaciones,-El%20abogado%20que" text:style-name="Internet_20_link" text:visited-style-name="Visited_20_Internet_20_Link">https://nik.grupokonecta.co:7070/#/app/articles/57236:~:text=p%C3%B3liza%20b%C3%A1sica.-,Procedimiento%20en%20la%20toma%20de%20reclamaciones,-El%20abogado%20que</text:a></text:p>
      <text:p text:style-name="P1">- Renta Diaria por Hospitalización: https://nik.grupokonecta.co:7070/#/app/articles/18464:~:text=sura.com.co-,Renta%20Diaria%20por%20Hospitalizaci%C3%B3n,-La%20renta%20diaria</text:p>
      <text:p text:style-name="P1">- Solicitud Carta de NO Reclamación: https://nik.grupokonecta.co:7070/#/app/articles/18464:~:text=24%20horas%20h%C3%A1biles.-,Carta%20de%20no%20Reclamaci%C3%B3n,-La%20carta%20de</text:p>
      <text:p text:style-name="P1">- Requisitos: Reclamación - Accidentes al Conductor: <text:a xlink:type="simple" xlink:href="https://nik.grupokonecta.co:7070/#/app/articles/18464:~:text=de%20tiempo%20determinado.-,Reclamación%20por%20Accidentes%20al%20Conductor%20y%20a%20Ocupantes,-Esta%20cobertura%20sólo" text:style-name="Internet_20_link" text:visited-style-name="Visited_20_Internet_20_Link">https://nik.grupokonecta.co:7070/#/app/articles/18464:~:text=de%20tiempo%20determinado.-,Reclamaci%C3%B3n%20por%20Accidentes%20al%20Conductor%20y%20a%20Ocupantes,-Esta%20cobertura%20s%C3%B3lo</text:a></text:p>
      <text:p text:style-name="P1">- Notificación Rappi generación del riesgo de la cuenta Rappi: <text:a xlink:type="simple" xlink:href="https://nik.grupokonecta.co:7070/#/app/articles/18286:~:text=debe%20generar%20expediente.-,Ingreso%20de%20reclamación%20Rappi,-En%20los%20casos" text:style-name="Internet_20_link" text:visited-style-name="Visited_20_Internet_20_Link">https://nik.grupokonecta.co:7070/#/app/articles/18286:~:text=debe%20generar%20expediente.-,Ingreso%20de%20reclamaci%C3%B3n%20Rappi,-En%20los%20casos</text:a></text:p>
      <text:p text:style-name="P1">- Reclamo por Llave Segura / Llanta Segura / Vidrio Seguro: https://nik.grupokonecta.co:7070/#/app/articles/18610:~:text=trav%C3%A9s%20de%20%23888.-,P%C3%A9rdida%20de%20Llaves,-El%20servicio%20de</text:p>
      <text:p text:style-name="P1">- Ingreso de reclamación Chattigo: Daños, <text:span text:style-name="T2">hasta Solicitudes Abogado Penal – Chattigo:</text:span> https://nik.grupokonecta.co:7070/#/app/articles/57552:~:text=Cali%3A%20Rellenar%20formulario-,Procedimiento%20para%20el%20ingreso%20de%20Soportes%20del%20Siniestro%20en%20Chattigo,-Cada%20vez%20que</text:p>
      <text:p text:style-name="P1">- Flujos de Estado – PPD: https://nik.grupokonecta.co:7070/#/app/articles/77292:~:text=m%C3%B3dulo%20de%20Comentarios.-,%C2%BFEn%20qu%C3%A9%20momentos%20interviene%20el%20caso%20el%20asesor%20del%20Back%20de%20indemnizaciones%3F,-A%20continuaci%C3%B3n%2C%20se</text:p>
      <text:p text:style-name="P1"/>
      <text:p text:style-name="P1"/>
      <text:p text:style-name="P1"/>
      <text:p text:style-name="P1"/>
      <text:p text:style-name="P1"/>
      <text:p text:style-name="P1"/>
      <text:p text:style-name="P1">#################################</text:p>
      <text:p text:style-name="P1"/>
      <text:p text:style-name="P1"/>
      <text:p text:style-name="P1"/>
      <text:p text:style-name="P1">#################################</text:p>
      <text:p text:style-name="P1">Tipo de transición: Automática: Color Naranja</text:p>
      <text:p text:style-name="P1"/>
      <text:p text:style-name="P5">----------------</text:p>
      <text:p text:style-name="P5">&lt;p style="margin: 4px 0; background-color: orange;"&gt;&lt;strong&gt;⚙️ Tipo de transición:&lt;/strong&gt; Automática 🤖&lt;/p&gt;</text:p>
      <text:p text:style-name="P5">#################################</text:p>
      <text:p text:style-name="P6">FLUJOS DE ESTADO</text:p>
      <text:p text:style-name="P6">Letra: 15px</text:p>
      <text:p text:style-name="P6">color: #000000;</text:p>
      <text:p text:style-name="P7"/>
      <text:p text:style-name="P8"/>
      <text:p text:style-name="P9">#################################</text:p>
      <text:p text:style-name="P10">Guiones</text:p>
      <text:p text:style-name="P11">Agregar guión cuando se recibe grúa pesado</text:p>
      <text:p text:style-name="P8"/>
      <text:p text:style-name="P8"/>
      <text:p text:style-name="P8"/>
      <text:p text:style-name="P8">#################################</text:p>
      <text:p text:style-name="P12">Gestión Cierre de Bloqueo</text:p>
      <text:p text:style-name="P12">Validar con Nora Sanchez y Manuela Grisales</text:p>
      <text:p text:style-name="P8">#################################</text:p>
      <text:p text:style-name="P8"/>
      <text:p text:style-name="P8"/>
      <text:p text:style-name="P8">Ya se utilizó:</text:p>
      <text:p text:style-name="P8">V<text:span text:style-name="T3">7</text:span><text:span text:style-name="T4">5</text:span></text:p>
      <text:p text:style-name="P8"/>
      <text:p text:style-name="P8"/>
      <text:p text:style-name="P8">#################################</text:p>
      <text:p text:style-name="P8"/>
      <text:p text:style-name="P8"/>
      <text:p text:style-name="P8"/>
      <text:p text:style-name="P8"/>
      <text:p text:style-name="P8">#################################</text:p>
      <text:p text:style-name="P8"/>
      <text:p text:style-name="P8"/>
      <text:p text:style-name="P8"/>
      <text:p text:style-name="P8"/>
      <text:p text:style-name="P8">#################################</text:p>
      <text:p text:style-name="P8"/>
      <text:p text:style-name="P8"/>
      <text:p text:style-name="P8"/>
      <text:p text:style-name="P8"/>
      <text:p text:style-name="P8">#################################</text:p>
      <text:p text:style-name="P8"/>
      <text:p text:style-name="P8"/>
      <text:p text:style-name="P8"/>
      <text:p text:style-name="P8"/>
      <text:p text:style-name="P8">#################################</text:p>
      <text:p text:style-name="P8"/>
      <text:p text:style-name="P8"/>
      <text:p text:style-name="P8"/>
      <text:p text:style-name="P8"/>
      <text:p text:style-name="P8"/>
      <text:p text:style-name="P8">#################################</text:p>
      <text:p text:style-name="P13">Errores en la tabla de distancia:</text:p>
      <text:p text:style-name="P14">- Medellín está muchas veces escrita mal y al reves como en antioquia.</text:p>
      <text:p text:style-name="P14">- Bogotá está mal escrito duplicado.</text:p>
      <text:p text:style-name="P14">- Cúcuta, Está duplicado.</text:p>
      <text:p text:style-name="P14">- Cali, está mal escrita muchas veces.</text:p>
      <text:p text:style-name="P14">- Barrancabermeja, está duplicado.</text:p>
      <text:p text:style-name="P14">- Cartago, duplicado.</text:p>
      <text:p text:style-name="P14">- <text:span text:style-name="T5">Bucaramanga, muchas veces.</text:span></text:p>
      <text:p text:style-name="P14">- <text:span text:style-name="T5">Pereira, duplicado</text:span></text:p>
      <text:p text:style-name="P14">- <text:span text:style-name="T5">Bello, duplicado.</text:span></text:p>
      <text:p text:style-name="P14">- <text:span text:style-name="T6">Ibagué, está con otro departamento y al reves como departamento</text:span></text:p>
      <text:p text:style-name="P14">- <text:span text:style-name="T6">Santa Marta, al reves como departamento</text:span></text:p>
      <text:p text:style-name="P14">- <text:span text:style-name="T6">Manizales, al reves como departamento y duplicado.</text:span></text:p>
      <text:p text:style-name="P14">- <text:span text:style-name="T6">Buenaventura, mal escrito</text:span></text:p>
      <text:p text:style-name="P14">- <text:span text:style-name="T6">Villavicencio, duplicado y con otro departamento.</text:span></text:p>
      <text:p text:style-name="P14">- <text:span text:style-name="T6">Pasto, repetido.</text:span></text:p>
      <text:p text:style-name="P14">- <text:span text:style-name="T6">Montería, repetido</text:span></text:p>
      <text:p text:style-name="P14">- <text:span text:style-name="T6">Neiva, repetido</text:span></text:p>
      <text:p text:style-name="P15">- Armenia, como departamento.</text:p>
      <text:p text:style-name="P15">- Sincelejo, como departamento.</text:p>
      <text:p text:style-name="P15">- Chia, repetido</text:p>
      <text:p text:style-name="P16">- <text:span text:style-name="T7">Buga, debe decir el nombre del departamento completo y como guadalajara de buga</text:span></text:p>
      <text:p text:style-name="P16">- <text:span text:style-name="T7">Bugalagrande, con espacio</text:span></text:p>
      <text:p text:style-name="P16">- <text:span text:style-name="T7">Buenaventura, debe decir el nombre del departamento completo</text:span></text:p>
      <text:p text:style-name="P17">- <text:span text:style-name="T7">Palmira, debe decir el nombre del departamento completo</text:span></text:p>
      <text:p text:style-name="P17">- <text:span text:style-name="T7">Tulua, debe decir el nombre del departamento completo</text:span></text:p>
      <text:p text:style-name="P17">- <text:span text:style-name="T7">Alcala, debe decir el nombre del departamento completo</text:span></text:p>
      <text:p text:style-name="P17">- <text:span text:style-name="T7">Andalucia, debe decir el nombre del departamento completo</text:span></text:p>
      <text:p text:style-name="P17">- <text:span text:style-name="T8">Caicedonia</text:span><text:span text:style-name="T7">, debe decir el nombre del departamento completo </text:span><text:span text:style-name="T8">y repetido</text:span></text:p>
      <text:p text:style-name="P17">- <text:span text:style-name="T8">Jamundi</text:span><text:span text:style-name="T7">, debe decir el nombre del departamento completo</text:span></text:p>
      <text:p text:style-name="P18">- <text:span text:style-name="T8">Guacari</text:span><text:span text:style-name="T7">, debe decir el nombre del departamento completo</text:span></text:p>
      <text:p text:style-name="P19">- <text:span text:style-name="T8">Cerrito</text:span><text:span text:style-name="T7">, debe decir el nombre del departamento completo</text:span></text:p>
      <text:p text:style-name="P19">- <text:span text:style-name="T8">Sevilla</text:span><text:span text:style-name="T7">, debe decir el nombre del departamento completo</text:span></text:p>
      <text:p text:style-name="P19">- S<text:span text:style-name="T8">tder de quilichao</text:span><text:span text:style-name="T7">, debe decir el nombre del departamento completo</text:span></text:p>
      <text:p text:style-name="P20">- <text:span text:style-name="T9">Vijes</text:span><text:span text:style-name="T7">, debe decir el nombre del departamento completo</text:span></text:p>
      <text:p text:style-name="P19">- <text:span text:style-name="T9">Yocoto</text:span><text:span text:style-name="T7">, debe decir el nombre del departamento completo</text:span></text:p>
      <text:p text:style-name="P19">- <text:span text:style-name="T9">Yumbo</text:span><text:span text:style-name="T7">, debe decir el nombre del departamento completo</text:span></text:p>
      <text:p text:style-name="P20">- <text:span text:style-name="T9">Zarzal</text:span><text:span text:style-name="T7">, debe decir el nombre del departamento completo</text:span></text:p>
      <text:p text:style-name="P20">- <text:span text:style-name="T10">Riohacha, repetido</text:span></text:p>
      <text:p text:style-name="P20">- <text:span text:style-name="T10">Popayan, refleja uno como departamento</text:span></text:p>
      <text:p text:style-name="P20">- <text:span text:style-name="T10">Tunja, repetido y como departamento</text:span></text:p>
      <text:p text:style-name="P20">- <text:span text:style-name="T10">Sahagun, como departamento</text:span></text:p>
      <text:p text:style-name="P20">- Florencia, <text:span text:style-name="T10">repetido y como departamento</text:span></text:p>
      <text:p text:style-name="P20">- Yopal, <text:span text:style-name="T10">repetido</text:span></text:p>
      <text:p text:style-name="P20">- Ipiales, <text:span text:style-name="T10">repetido</text:span></text:p>
      <text:p text:style-name="P20">- Fusagasug<text:span text:style-name="T10">a, repetido</text:span></text:p>
      <text:p text:style-name="P20">- <text:span text:style-name="T11">Pitalito, repetido</text:span></text:p>
      <text:p text:style-name="P21">- Sogamoso, repetido</text:p>
      <text:p text:style-name="P20">- <text:span text:style-name="T11">Quibdo, repetido</text:span></text:p>
      <text:p text:style-name="P20">- Duitama, <text:span text:style-name="T11">repetido</text:span></text:p>
      <text:p text:style-name="P20">- <text:span text:style-name="T11">Tame, repetido</text:span></text:p>
      <text:p text:style-name="P20">- Girardot, <text:span text:style-name="T11">repetido y con otro departamento</text:span></text:p>
      <text:p text:style-name="P20">- Ci<text:span text:style-name="T11">e</text:span>naga de Oro, <text:span text:style-name="T11">repetido</text:span></text:p>
      <text:p text:style-name="P20">- <text:span text:style-name="T11">Cienaga, como departamento.</text:span></text:p>
      <text:p text:style-name="P20">- Montel<text:span text:style-name="T11">i</text:span>bano, <text:span text:style-name="T11">repetido</text:span></text:p>
      <text:p text:style-name="P20">- <text:span text:style-name="T11">Maicao, repetido</text:span></text:p>
      <text:p text:style-name="P20">- Zipaquir<text:span text:style-name="T11">a, repetido</text:span></text:p>
      <text:p text:style-name="P20">- Facatativá, <text:span text:style-name="T12">repetido</text:span></text:p>
      <text:p text:style-name="P16"/>
      <text:p text:style-name="P16">----------------</text:p>
      <text:p text:style-name="P22">SUGERENCIA:</text:p>
      <text:p text:style-name="P16">Grúa: Asistencia Vehículos Pesados y Utilitarios Pesados</text:p>
      <text:p text:style-name="P16">Excedente Km:</text:p>
      <text:p text:style-name="P16">Andres Delgado</text:p>
      <text:p text:style-name="P16">Nota de valor de 150.000 pesos se cobra excedente</text:p>
      <text:p text:style-name="P16"/>
      <text:p text:style-name="P16">----------------</text:p>
      <text:p text:style-name="P16">- Matriz de Pequeños Eventos: <text:s/><text:span text:style-name="T13">Agregar partes el vh en imagenes señaladas. (Pendiente de Juan)</text:span></text:p>
      <text:p text:style-name="P23">-Crear articulo: Contingencia de Aplicativos. <text:a xlink:type="simple" xlink:href="https://nik.grupokonecta.co:7070/#/app/articles/18274" text:style-name="Internet_20_link" text:visited-style-name="Visited_20_Internet_20_Link">https://nik.grupokonecta.co:7070/#/app/articles/18274</text:a> <text:span text:style-name="T14">(Pendiente de Juan)</text:span></text:p>
      <text:p text:style-name="P23">-Crear artículo: Geocerca de Movilidad Flexible <text:span text:style-name="T14">(Pendiente de Juan)</text:span></text:p>
      <text:p text:style-name="P23">- <text:span text:style-name="T15">Crear Artículo: Guias de Objeción: </text:span><text:a xlink:type="simple" xlink:href="https://nik.grupokonecta.co:7070/#/app/articles/38211" text:style-name="Internet_20_link" text:visited-style-name="Visited_20_Internet_20_Link"><text:span text:style-name="T15">https://nik.grupokonecta.co:7070/#/app/articles/38211</text:span></text:a><text:span text:style-name="T15"> </text:span><text:span text:style-name="T14">(Pendiente de Juan)</text:span></text:p>
      <text:p text:style-name="P23"><text:span text:style-name="T16">-Tipificación de Vehículo</text:span><text:span text:style-name="T17">S, AGREGAR tipificación de vehículo botellero. </text:span><text:span text:style-name="T18"><text:s text:c="2"/></text:span><text:span text:style-name="T19">(Pendiente de Juan)</text:span><text:line-break/>- Matriz de Pequeños Evento; <text:span text:style-name="T14">en “Asegurado acepta hacerlo por pequeños eventos:”, agregar esta alerta: </text:span><text:a xlink:type="simple" xlink:href="https://nik.grupokonecta.co:7070/#/app/articles/70527:~:text=Procedimiento%20MAXPAR,en%20Abra%20Ya" text:style-name="Internet_20_link" text:visited-style-name="Visited_20_Internet_20_Link"><text:span text:style-name="T20">https://nik.grupokonecta.co:7070/#/app/articles/70527:~:text=Procedimiento%20MAXPAR,en%20Abra%20Ya</text:span></text:a><text:span text:style-name="T20">). <text:s text:c="2"/></text:span><text:span text:style-name="T14">(Pendiente de Juan)</text:span></text:p>
      <text:p text:style-name="P24"/>
      <text:p text:style-name="P24">----------------</text:p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26"/>
      <text:p text:style-name="P27">#################################</text:p>
      <text:p text:style-name="P26"/>
      <text:p text:style-name="P28">PENDIENTES:</text:p>
      <text:p text:style-name="P26">Indemnizaciones:</text:p>
      <text:p text:style-name="P26">Flujo de estado de reclamación, vehiculo de reemplazo sería dinámico</text:p>
      <text:p text:style-name="P29"/>
      <text:p text:style-name="P26">Coordinación y Finalización:</text:p>
      <text:p text:style-name="P26">Tabla de distancia</text:p>
      <text:p text:style-name="P26">Cruce de zonas</text:p>
      <text:p text:style-name="P30"><text:tab/></text:p>
      <text:p text:style-name="P31">#################################</text:p>
      <text:p text:style-name="P32"/>
      <text:p text:style-name="P33"/>
      <text:p text:style-name="P34"/>
      <text:p text:style-name="P34"/>
      <text:p text:style-name="P34"/>
      <text:p text:style-name="P34">#################################</text:p>
      <text:p text:style-name="P34">PALETA DE COLORES DE LA PÁGINA</text:p>
      <text:p text:style-name="P34">Azul claro: 2d6df6</text:p>
      <text:p text:style-name="P34">Azul oscuro: 0033a0</text:p>
      <text:p text:style-name="P34">Amarillo: e3e829</text:p>
      <text:p text:style-name="P34">Cian: 01b7cd</text:p>
      <text:p text:style-name="P34">Rojo alerta: ff0000 </text:p>
      <text:p text:style-name="P34">Tamaño y color de letra alertas: Blanca, 20px</text:p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7cm" fo:page-height="599.999cm" style:num-format="1" style:print-orientation="portrait" fo:margin-top="0cm" fo:margin-bottom="0cm" fo:margin-left="0cm" fo:margin-right="0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cm" fo:page-height="300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8T21:42:40.168772000</meta:creation-date>
    <dc:date>2026-06-26T15:19:35.618563900</dc:date>
    <meta:editing-duration>P2DT16H58M6S</meta:editing-duration>
    <meta:editing-cycles>381</meta:editing-cycles>
    <meta:generator>LibreOffice/26.2.2.2$Windows_X86_64 LibreOffice_project/1f77d10d6938fd34972958f64b2bcfa54f8b1ba5</meta:generator>
    <meta:document-statistic meta:table-count="0" meta:image-count="0" meta:object-count="0" meta:page-count="1" meta:paragraph-count="133" meta:word-count="682" meta:character-count="7062" meta:non-whitespace-character-count="6501"/>
  </office:meta>
</office:document-meta>
</file>